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40000035108A041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.766cm" svg:y="1.626cm" svg:width="11.959cm" svg:height="22.463cm" draw:z-index="0"><draw:image xlink:href="Pictures/10000000000001C40000035108A04179.png" xlink:type="simple" xlink:show="embed" xlink:actuate="onLoad"/></draw:frame>Licensed in Wisconsin should function as a button that opens the disclaimers and legal/licencing information. It will be in other locations too, but it's good to have this front and cen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5-10T14:49:35.73</meta:creation-date>
    <meta:document-statistic meta:table-count="0" meta:image-count="1" meta:object-count="0" meta:page-count="1" meta:paragraph-count="1" meta:word-count="31" meta:character-count="188"/>
    <dc:date>2026-05-10T14:51:25.97</dc:date>
    <meta:editing-duration>PT1M52S</meta:editing-duration>
    <meta:editing-cycles>1</meta:editing-cycles>
    <meta:generator>OpenOffice/4.1.15$Win32 OpenOffice.org_project/4115m2$Build-9813</meta:generator>
  </office:meta>
</office:document-meta>
</file>